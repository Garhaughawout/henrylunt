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7000002B9271B43BBB1B66A1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fo:font-weight="bold" officeooo:rsid="001087e1" officeooo:paragraph-rsid="001087e1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officeooo:rsid="001087e1" officeooo:paragraph-rsid="001087e1" style:font-size-asian="12.25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k <text:s/>George <text:s/>Lunt <text:s/>Naturalization <text:s/>Record</text:p>
      <text:p text:style-name="P2"/>
      <text:p text:style-name="P1"><draw:frame draw:style-name="fr1" draw:name="Image1" text:anchor-type="paragraph" svg:width="7.1335in" svg:height="8.7689in" draw:z-index="0"><draw:image xlink:href="Pictures/1000000000000237000002B9271B43BBB1B66A1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23:34.852861792</meta:creation-date>
    <dc:date>2023-07-17T15:25:58.163069593</dc:date>
    <meta:editing-duration>PT2M24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5" meta:character-count="43" meta:non-whitespace-character-count="35"/>
  </office:meta>
</office:document-meta>
</file>