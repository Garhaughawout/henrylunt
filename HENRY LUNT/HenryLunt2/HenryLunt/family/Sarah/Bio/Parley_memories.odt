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e95d7" officeooo:paragraph-rsid="001e95d7" style:font-size-asian="14pt" style:font-size-complex="14pt"/>
    </style:style>
    <style:style style:name="P2" style:family="paragraph" style:parent-style-name="Standard">
      <style:text-properties fo:font-size="14pt" officeooo:rsid="001eeabc" officeooo:paragraph-rsid="001eeabc" style:font-size-asian="14pt" style:font-size-complex="14pt"/>
    </style:style>
    <style:style style:name="P3" style:family="paragraph" style:parent-style-name="Standard">
      <style:paragraph-properties fo:text-align="center" style:justify-single-word="false"/>
      <style:text-properties fo:font-size="14pt" fo:font-weight="bold" officeooo:rsid="001e95d7" officeooo:paragraph-rsid="001e95d7"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eabc" officeooo:paragraph-rsid="001eeabc"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e95d7" officeooo:paragraph-rsid="001e95d7"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6pt" fo:font-weight="bold" officeooo:rsid="001e95d7" officeooo:paragraph-rsid="001e95d7"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eeabc" officeooo:paragraph-rsid="001eeabc" style:font-size-asian="16pt" style:font-weight-asian="bold" style:font-size-complex="16pt" style:font-weight-complex="bold"/>
    </style:style>
    <style:style style:name="P8" style:family="paragraph" style:parent-style-name="Standard">
      <style:text-properties fo:font-size="12pt" officeooo:rsid="001e95d7" officeooo:paragraph-rsid="001e95d7" style:font-size-asian="10.5pt" style:font-size-complex="12pt"/>
    </style:style>
    <style:style style:name="P9" style:family="paragraph" style:parent-style-name="Standard">
      <style:paragraph-properties fo:text-align="center" style:justify-single-word="false"/>
      <style:text-properties fo:font-size="12pt" officeooo:rsid="001e95d7" officeooo:paragraph-rsid="001e95d7" style:font-size-asian="10.5pt" style:font-size-complex="12pt"/>
    </style:style>
    <style:style style:name="P10" style:family="paragraph" style:parent-style-name="Standard">
      <style:text-properties fo:font-size="12pt" officeooo:rsid="001eeabc" officeooo:paragraph-rsid="001eeabc" style:font-size-asian="10.5pt" style:font-size-complex="12pt"/>
    </style:style>
    <style:style style:name="P11" style:family="paragraph" style:parent-style-name="Standard">
      <style:paragraph-properties fo:text-align="center" style:justify-single-word="false"/>
      <style:text-properties fo:font-size="12pt" fo:font-weight="bold" officeooo:rsid="001eeabc" officeooo:paragraph-rsid="001eeabc" style:font-size-asian="10.5pt" style:font-weight-asian="bold" style:font-size-complex="12pt" style:font-weight-complex="bold"/>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mories of Uncle Parley</text:p>
      <text:p text:style-name="P1"/>
      <text:p text:style-name="P6">Uncle Parley Lunt</text:p>
      <text:p text:style-name="P3">By Ora Lunt Bluth, Sept. 1984</text:p>
      <text:p text:style-name="P9"/>
      <text:p text:style-name="P1">Uncle Parley was the 3<text:span text:style-name="T1">rd</text:span> son in the family of Sarah and Henry Lunt and he was the last of their children to be born in Cedar City. <text:s/>He didn’t come down to Mexico and visit us as much as our other uncles but never the less, we loved him.</text:p>
      <text:p text:style-name="P8"/>
      <text:p text:style-name="P1">He was a quiet man, but very kind and unselfish like all his brothers. <text:s/>Uncle Alma and Dad talked of him with great respect. <text:s/>They said he never used to get after them or do anything to make them angry. <text:s/>He was even-tempered and very kind. <text:s/>He also had a sense of humor just like all his brothers.</text:p>
      <text:p text:style-name="P8"/>
      <text:p text:style-name="P1">We stopped by his home on the way to Aunt Chloes funeral and he and his wife treated us very kindly. <text:s/>We needed to get ready and change our clothes. <text:s/>We also enjoyed getting better acquainted with he and his wife at that time.</text:p>
      <text:p text:style-name="P8"/>
      <text:p text:style-name="P1">We appreciate and will always be thankful to he and his sons for helping us so much when our father was ill and at the time of his death.</text:p>
      <text:p text:style-name="P1"/>
      <text:p text:style-name="P1"/>
      <text:p text:style-name="P7">Uncle Parley Lunt</text:p>
      <text:p text:style-name="P4">By Sylvia Lunt Heywood</text:p>
      <text:p text:style-name="P11"/>
      <text:p text:style-name="P2">As I remember Uncle Parley, he was the lightest in complexion and his eyes were not dark like those of his brothers. <text:s/>He was a very kind man and somewhat quiet in his manner.</text:p>
      <text:p text:style-name="P10"/>
      <text:p text:style-name="P2">I remember where he lived in Virden, out in the beautiful, peaceful farm area.</text:p>
      <text:p text:style-name="P10"/>
      <text:p text:style-name="P2">Uncle Parley came to my wedding and that was so special to me that he took the time to drive all the way from the Gila Valley to be with us in the temple that day.</text:p>
      <text:p text:style-name="P10"/>
      <text:p text:style-name="P2">When Uncle Alma died, he and Uncle Heaton were the only Lunt brothers still living. <text:s/>They came down to the funeral and did what they could to help by dressing Uncle Alma in his burial clothing, etc.</text:p>
      <text:p text:style-name="P10"/>
      <text:p text:style-name="P2">Uncle Parley died in 1968 just a little over a year before the last of the brothers, Heaton died. <text:s/>There was a two year age difference between all of these boys except for my father who was born 4 years after Uncle Owen. <text:s/>Being close in age helped them grow up together and there was always a bond of unity &amp; support in this good family of Lunt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2T10:43:58.718845473</meta:creation-date>
    <dc:date>2023-09-12T12:47:31.327287936</dc:date>
    <meta:editing-duration>PT3M1S</meta:editing-duration>
    <meta:editing-cycles>2</meta:editing-cycles>
    <meta:generator>LibreOffice/6.0.7.3$Linux_X86_64 LibreOffice_project/00m0$Build-3</meta:generator>
    <meta:document-statistic meta:table-count="0" meta:image-count="0" meta:object-count="0" meta:page-count="1" meta:paragraph-count="14" meta:word-count="391" meta:character-count="1968" meta:non-whitespace-character-count="1580"/>
  </office:meta>
</office:document-meta>
</file>